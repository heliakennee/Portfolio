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0000000F77F094E0C.png" manifest:media-type="image/png"/>
  <manifest:file-entry manifest:full-path="Pictures/10000001000001D6000001EC69EB2AA1.png" manifest:media-type="image/png"/>
  <manifest:file-entry manifest:full-path="Pictures/10000001000002450000018C0057953D.png" manifest:media-type="image/png"/>
  <manifest:file-entry manifest:full-path="Pictures/1000000100000220000000F796EC5F12.png" manifest:media-type="image/png"/>
  <manifest:file-entry manifest:full-path="Pictures/10000001000002450000018C5C49CD00.png" manifest:media-type="image/png"/>
  <manifest:file-entry manifest:full-path="Pictures/1000000100000220000000F7E34C4B20.png" manifest:media-type="image/png"/>
  <manifest:file-entry manifest:full-path="Pictures/10000001000007130000015257BAE5A3.png" manifest:media-type="image/png"/>
  <manifest:file-entry manifest:full-path="Pictures/100000010000058A000003BFC95746D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7f47" officeooo:paragraph-rsid="00057f47"/>
    </style:style>
    <style:style style:name="P2" style:family="paragraph" style:parent-style-name="Standard">
      <style:text-properties officeooo:rsid="0005b153" officeooo:paragraph-rsid="0005b15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Image1" text:anchor-type="char" svg:width="17cm" svg:height="11.497cm" draw:z-index="0"><draw:image xlink:href="Pictures/100000010000058A000003BFC95746DC.png" xlink:type="simple" xlink:show="embed" xlink:actuate="onLoad" draw:mime-type="image/png"/></draw:frame>Aller récupérer le lien d’installation sur le proxmox community script </text:p>
      <text:p text:style-name="P1"/>
      <text:p text:style-name="P1"><draw:frame draw:style-name="fr2" draw:name="Image2" text:anchor-type="char" svg:width="17cm" svg:height="3.171cm" draw:z-index="1"><draw:image xlink:href="Pictures/10000001000007130000015257BAE5A3.png" xlink:type="simple" xlink:show="embed" xlink:actuate="onLoad" draw:mime-type="image/png"/></draw:frame>Executer la commande dans le nœud du pve </text:p>
      <text:p text:style-name="P1"/>
      <text:p text:style-name="P1">Sélectionner le mode d’installation</text:p>
      <text:p text:style-name="P1"><draw:frame draw:style-name="fr1" draw:name="Image3" text:anchor-type="char" svg:x="0.824cm" svg:y="1.074cm" svg:width="12.968cm" svg:height="8.839cm" draw:z-index="2"><draw:image xlink:href="Pictures/10000001000002450000018C5C49CD00.png" xlink:type="simple" xlink:show="embed" xlink:actuate="onLoad" draw:mime-type="image/png"/></draw:frame></text:p>
      <text:p text:style-name="P1"/>
      <text:p text:style-name="P1"><draw:frame draw:style-name="fr1" draw:name="Image6" text:anchor-type="char" svg:x="0.614cm" svg:y="-1.33cm" svg:width="14.393cm" svg:height="6.535cm" draw:z-index="4"><draw:image xlink:href="Pictures/1000000100000220000000F796EC5F12.png" xlink:type="simple" xlink:show="embed" xlink:actuate="onLoad" draw:mime-type="image/png"/></draw:frame><text:soft-page-break/></text:p>
      <text:p text:style-name="P1"><draw:frame draw:style-name="fr1" draw:name="Image4" text:anchor-type="char" svg:x="0.639cm" svg:y="0.041cm" svg:width="15.372cm" svg:height="10.478cm" draw:z-index="7"><draw:image xlink:href="Pictures/10000001000002450000018C0057953D.png" xlink:type="simple" xlink:show="embed" xlink:actuate="onLoad" draw:mime-type="image/png"/></draw:frame><draw:frame draw:style-name="fr1" draw:name="Image5" text:anchor-type="char" svg:x="0.388cm" svg:y="11.187cm" svg:width="14.393cm" svg:height="6.535cm" draw:z-index="3"><draw:image xlink:href="Pictures/1000000100000220000000F7E34C4B20.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7" text:anchor-type="char" svg:x="0.108cm" svg:y="-1.025cm" svg:width="14.393cm" svg:height="6.535cm" draw:z-index="5"><draw:image xlink:href="Pictures/1000000100000220000000F77F094E0C.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draw:frame draw:style-name="fr1" draw:name="Image8" text:anchor-type="char" svg:x="0.055cm" svg:y="3.598cm" svg:width="14.393cm" svg:height="10.993cm" draw:z-index="6"><draw:image xlink:href="Pictures/10000001000001D6000001EC69EB2AA1.png" xlink:type="simple" xlink:show="embed" xlink:actuate="onLoad" draw:mime-type="image/png"/></draw:frame>Lors de l’installation vous allez pouvoir choisir un mot de passe, sélectionner les informations sur la vm comme le stockage et mes paramètres ip ou le matériel. Si vous le souhaitez vous pouvez sélectionner les infos par défaut <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Vous accédez ensuite à la page web zabbix avec l’url <text:a xlink:type="simple" xlink:href="http://ip_de_la_vm/zabbix" text:style-name="Internet_20_link" text:visited-style-name="Visited_20_Internet_20_Link">http://ip_de_la_vm/zabbix</text:a> avec l’utilisateur Admin et le mot de passe zabbix</text:p>
      <text:p text:style-name="P2"/>
      <text:p text:style-name="P2">Cette solution est un mode simplifié, dédié à proxmox et permet de gagner du temps sur l’installation de nombreux service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08T23:18:42.182229868</meta:creation-date>
    <dc:date>2026-06-08T23:38:02.619897059</dc:date>
    <meta:editing-duration>PT5M33S</meta:editing-duration>
    <meta:editing-cycles>1</meta:editing-cycles>
    <meta:generator>LibreOffice/24.2.7.2$Linux_X86_64 LibreOffice_project/420$Build-2</meta:generator>
    <meta:document-statistic meta:table-count="0" meta:image-count="8" meta:object-count="0" meta:page-count="3" meta:paragraph-count="6" meta:word-count="100" meta:character-count="629" meta:non-whitespace-character-count="530"/>
  </office:meta>
</office:document-meta>
</file>