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39F7A2724E5.png" manifest:media-type="image/png"/>
  <manifest:file-entry manifest:full-path="Pictures/100000010000077F0000039F4A7061A6.png" manifest:media-type="image/png"/>
  <manifest:file-entry manifest:full-path="Pictures/10000001000007800000003645230792.png" manifest:media-type="image/png"/>
  <manifest:file-entry manifest:full-path="Pictures/100000010000077F000003A1DC0304B5.png" manifest:media-type="image/png"/>
  <manifest:file-entry manifest:full-path="Pictures/100000010000077F000003A1DA4C77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fb7" officeooo:paragraph-rsid="00023fb7"/>
    </style:style>
    <style:style style:name="P2" style:family="paragraph" style:parent-style-name="Standard">
      <style:text-properties officeooo:rsid="00023fb7" officeooo:paragraph-rsid="0002a2c5"/>
    </style:style>
    <style:style style:name="P3" style:family="paragraph" style:parent-style-name="Standard">
      <style:text-properties fo:color="#355269" loext:opacity="100%" officeooo:rsid="0002a2c5" officeooo:paragraph-rsid="0002a2c5"/>
    </style:style>
    <style:style style:name="T1" style:family="text">
      <style:text-properties officeooo:rsid="0002a2c5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02a2c5"/>
    </style:style>
    <style:style style:name="T4" style:family="text">
      <style:text-properties fo:color="#355269" loext:opacity="100%"/>
    </style:style>
    <style:style style:name="T5" style:family="text">
      <style:text-properties fo:color="#355269" loext:opacity="100%" officeooo:rsid="0002a2c5"/>
    </style:style>
    <style:style style:name="T6" style:family="text">
      <style:text-properties fo:color="#355269" loext:opacity="100%" style:text-underline-style="none"/>
    </style:style>
    <style:style style:name="T7" style:family="text">
      <style:text-properties fo:color="#355269" loext:opacity="100%" fo:font-style="italic" style:font-style-asian="italic" style:font-style-complex="italic"/>
    </style:style>
    <style:style style:name="T8" style:family="text">
      <style:text-properties fo:color="#355269" loext:opacity="100%" fo:font-style="italic" officeooo:rsid="0002a2c5" style:font-style-asian="italic" style:font-style-complex="italic"/>
    </style:style>
    <style:style style:name="T9" style:family="text">
      <style:text-properties fo:color="#355269" loext:opacity="100%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0.815cm" svg:width="17cm" svg:height="8.229cm" draw:z-index="0"><draw:image xlink:href="Pictures/100000010000077F000003A1DA4C773A.png" xlink:type="simple" xlink:show="embed" xlink:actuate="onLoad" draw:mime-type="image/png"/></draw:frame><draw:frame draw:style-name="fr2" draw:name="Image2" text:anchor-type="char" svg:x="-0.06cm" svg:y="9.342cm" svg:width="17cm" svg:height="8.229cm" draw:z-index="1"><draw:image xlink:href="Pictures/100000010000077F000003A1DC0304B5.png" xlink:type="simple" xlink:show="embed" xlink:actuate="onLoad" draw:mime-type="image/png"/></draw:frame>Commencer par sauvegarder la vm à exporter <text:span text:style-name="T1">sur le proxmox1</text:span></text:p>
      <text:p text:style-name="P1"/>
      <text:p text:style-name="P1">Importer la sauvegarde depuis un autre pc ayant accès aux deux proxmox</text:p>
      <text:p text:style-name="P1"/>
      <text:p text:style-name="P1">scp <text:a xlink:type="simple" xlink:href="mailto:root@ip_du_proxmox" text:style-name="Internet_20_link" text:visited-style-name="Visited_20_Internet_20_Link">root@ip_du_proxmox</text:a><text:span text:style-name="T1">1</text:span>:/var/lib/vz/dump/nom_de_la_sauvegarde.vma.zst /tmp<text:line-break/><text:line-break/><draw:frame draw:style-name="fr2" draw:name="Image3" text:anchor-type="char" svg:x="-0.06cm" svg:y="0.958cm" svg:width="17cm" svg:height="0.478cm" draw:z-index="2"><draw:image xlink:href="Pictures/10000001000007800000003645230792.png" xlink:type="simple" xlink:show="embed" xlink:actuate="onLoad" draw:mime-type="image/png"/></draw:frame>Après la chargement une copie de la sauvegarde se trouve sur le pc dans /tmp (sous linux). Il maintenant copier l’archive sur <text:span text:style-name="T1">le</text:span> proxmox<text:span text:style-name="T1">2</text:span>. </text:p>
      <text:p text:style-name="P1"/>
      <text:p text:style-name="P1">scp /tmp/nom_de_la_sauvegarde.vma.zst root@ip_du_proxmox<text:span text:style-name="T1">2</text:span>:/var/lib/vz/dump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Aller</text:span> dans l’interface graphique de proxmox<text:span text:style-name="T1">2</text:span>, la sauvegarde apparaît :</text:p>
      <text:p text:style-name="P2"/>
      <text:p text:style-name="P2"><draw:frame draw:style-name="fr1" draw:name="Image4" text:anchor-type="char" svg:width="17cm" svg:height="8.211cm" draw:z-index="3"><draw:image xlink:href="Pictures/100000010000077F0000039F4A7061A6.png" xlink:type="simple" xlink:show="embed" xlink:actuate="onLoad" draw:mime-type="image/png"/></draw:frame><text:tab/><text:tab/><text:tab/><text:tab/><text:tab/><text:tab/><text:tab/><text:tab/><text:tab/><text:tab/><text:tab/><text:tab/> <text:s text:c="3"/>Restaurer la sauvegarde en choisissant le stockage lvm, un identifiant et la RAM si besoin.</text:p>
      <text:p text:style-name="P2"/>
      <text:p text:style-name="P1"><draw:frame draw:style-name="fr1" draw:name="Image5" text:anchor-type="char" svg:width="17cm" svg:height="8.211cm" draw:z-index="4"><draw:image xlink:href="Pictures/100000010000077F0000039F7A2724E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3">Remarque : - la commande scp permet de copier en utiliser ssh. Il faut que l’utilisateur utilisé sur la machine cible ait les permissions de se connecter en ssh.</text:p>
      <text:p text:style-name="P3">- si la machine intermédiaire est sous windows, la commande sera légerement differente</text:p>
      <text:p text:style-name="P3"/>
      <text:p text:style-name="P2"><text:span text:style-name="T7">scp </text:span><text:a xlink:type="simple" xlink:href="mailto:root@ip_du_proxmox" text:style-name="Internet_20_link" text:visited-style-name="Visited_20_Internet_20_Link"><text:span text:style-name="T9">root@ip_du_proxmox</text:span></text:a><text:span text:style-name="T8">1</text:span><text:span text:style-name="T7">:/var/lib/vz/dump/nom_de_la_sauvegarde.vma.zst </text:span><text:span text:style-name="T8">C:\chemin\vers\l’archive</text:span></text:p>
      <text:p text:style-name="P2"><text:span text:style-name="T7"/></text:p>
      <text:p text:style-name="P2"><text:span text:style-name="T7">scp </text:span><text:span text:style-name="T8">C:\chemin\vers\l’archive\</text:span><text:span text:style-name="T7">nom_de_la_sauvegarde.vma.zst root@ip_du_proxmox</text:span><text:span text:style-name="T8">2</text:span><text:span text:style-name="T7">:/var/lib/vz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24:19.159781832</meta:creation-date>
    <dc:date>2026-01-27T12:44:33.990994864</dc:date>
    <meta:editing-duration>PT9M18S</meta:editing-duration>
    <meta:editing-cycles>1</meta:editing-cycles>
    <meta:document-statistic meta:table-count="0" meta:image-count="5" meta:object-count="0" meta:page-count="2" meta:paragraph-count="11" meta:word-count="125" meta:character-count="1037" meta:non-whitespace-character-count="891"/>
    <meta:generator>LibreOffice/24.2.7.2$Linux_X86_64 LibreOffice_project/420$Build-2</meta:generator>
  </office:meta>
</office:document-meta>
</file>